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Arial Black" svg:font-family="'Arial Black'"/>
    <style:font-face style:name="DejaVu Sans" svg:font-family="'DejaVu Sans'"/>
    <style:font-face style:name="Liberation Sans" svg:font-family="'Liberation Sans'" style:font-family-generic="roman" style:font-pitch="variable"/>
    <style:font-face style:name="Liberation Sans1" svg:font-family="'Liberation Sans'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 loext:decorative="false"/>
    </style:style>
    <style:style style:name="gr2" style:family="graphic" style:parent-style-name="standard">
      <style:graphic-properties draw:stroke="solid" svg:stroke-width="0.034cm" svg:stroke-color="#e7e7e7" draw:stroke-linejoin="miter" svg:stroke-linecap="square" draw:fill="none" fo:padding-top="0.017cm" fo:padding-bottom="0.017cm" fo:padding-left="0.017cm" fo:padding-right="0.017cm" loext:decorative="false"/>
    </style:style>
    <style:style style:name="gr3" style:family="graphic" style:parent-style-name="standard">
      <style:graphic-properties draw:stroke="none" draw:fill="solid" draw:fill-color="#000000" loext:decorative="false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3.889cm" fo:padding-top="0cm" fo:padding-bottom="0cm" fo:padding-left="0cm" fo:padding-right="0cm" loext:decorative="false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6.173cm" fo:padding-top="0cm" fo:padding-bottom="0cm" fo:padding-left="0cm" fo:padding-right="0cm" loext:decorative="false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2.256cm" fo:padding-top="0cm" fo:padding-bottom="0cm" fo:padding-left="0cm" fo:padding-right="0cm" loext:decorative="false"/>
      <style:paragraph-properties style:writing-mode="lr-tb"/>
    </style:style>
    <style:style style:name="gr7" style:family="graphic" style:parent-style-name="standard">
      <style:graphic-properties draw:stroke="none" draw:fill="solid" draw:fill-color="#5983b0" loext:decorative="false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598cm" fo:min-width="2.965cm" fo:padding-top="0cm" fo:padding-bottom="0cm" fo:padding-left="0cm" fo:padding-right="0cm" loext:decorative="false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496cm" fo:min-width="5.137cm" fo:padding-top="0cm" fo:padding-bottom="0cm" fo:padding-left="0cm" fo:padding-right="0cm" loext:decorative="false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3.66cm" fo:padding-top="0cm" fo:padding-bottom="0cm" fo:padding-left="0cm" fo:padding-right="0cm" loext:decorative="false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1.548cm" fo:padding-top="0cm" fo:padding-bottom="0cm" fo:padding-left="0cm" fo:padding-right="0cm" loext:decorative="false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496cm" fo:min-width="3.985cm" fo:padding-top="0cm" fo:padding-bottom="0cm" fo:padding-left="0cm" fo:padding-right="0cm" loext:decorative="false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2.69cm" fo:padding-top="0cm" fo:padding-bottom="0cm" fo:padding-left="0cm" fo:padding-right="0cm" loext:decorative="false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598cm" fo:min-width="2.824cm" fo:padding-top="0cm" fo:padding-bottom="0cm" fo:padding-left="0cm" fo:padding-right="0cm" loext:decorative="false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598cm" fo:min-width="1.696cm" fo:padding-top="0cm" fo:padding-bottom="0cm" fo:padding-left="0cm" fo:padding-right="0cm" loext:decorative="false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2.621cm" fo:padding-top="0cm" fo:padding-bottom="0cm" fo:padding-left="0cm" fo:padding-right="0cm" loext:decorative="false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1.445cm" fo:padding-top="0cm" fo:padding-bottom="0cm" fo:padding-left="0cm" fo:padding-right="0cm" loext:decorative="false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496cm" fo:min-width="1.896cm" fo:padding-top="0cm" fo:padding-bottom="0cm" fo:padding-left="0cm" fo:padding-right="0cm" loext:decorative="false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3.523cm" fo:padding-top="0cm" fo:padding-bottom="0cm" fo:padding-left="0cm" fo:padding-right="0cm" loext:decorative="false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1.782cm" fo:padding-top="0cm" fo:padding-bottom="0cm" fo:padding-left="0cm" fo:padding-right="0cm" loext:decorative="false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3.162cm" fo:padding-top="0cm" fo:padding-bottom="0cm" fo:padding-left="0cm" fo:padding-right="0cm" loext:decorative="false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3.47cm" fo:padding-top="0cm" fo:padding-bottom="0cm" fo:padding-left="0cm" fo:padding-right="0cm" loext:decorative="false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496cm" fo:min-width="2.384cm" fo:padding-top="0cm" fo:padding-bottom="0cm" fo:padding-left="0cm" fo:padding-right="0cm" loext:decorative="false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0.317cm" fo:padding-top="0cm" fo:padding-bottom="0cm" fo:padding-left="0cm" fo:padding-right="0cm" loext:decorative="false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4.204cm" fo:padding-top="0cm" fo:padding-bottom="0cm" fo:padding-left="0cm" fo:padding-right="0cm" loext:decorative="false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496cm" fo:min-width="4.16cm" fo:padding-top="0cm" fo:padding-bottom="0cm" fo:padding-left="0cm" fo:padding-right="0cm" loext:decorative="false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3.756cm" fo:padding-top="0cm" fo:padding-bottom="0cm" fo:padding-left="0cm" fo:padding-right="0cm" loext:decorative="false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496cm" fo:min-width="4.258cm" fo:padding-top="0cm" fo:padding-bottom="0cm" fo:padding-left="0cm" fo:padding-right="0cm" loext:decorative="false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598cm" fo:min-width="2.518cm" fo:padding-top="0cm" fo:padding-bottom="0cm" fo:padding-left="0cm" fo:padding-right="0cm" loext:decorative="false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598cm" fo:min-width="4.941cm" fo:padding-top="0cm" fo:padding-bottom="0cm" fo:padding-left="0cm" fo:padding-right="0cm" loext:decorative="false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496cm" fo:min-width="4.668cm" fo:padding-top="0cm" fo:padding-bottom="0cm" fo:padding-left="0cm" fo:padding-right="0cm" loext:decorative="false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5.267cm" fo:padding-top="0cm" fo:padding-bottom="0cm" fo:padding-left="0cm" fo:padding-right="0cm" loext:decorative="false"/>
      <style:paragraph-properties style:writing-mode="lr-tb"/>
    </style:style>
    <style:style style:name="gr33" style:family="graphic" style:parent-style-name="standard">
      <style:graphic-properties draw:stroke="none" draw:fill="solid" draw:fill-color="#4e4e4e" loext:decorative="false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4.597cm" fo:padding-top="0cm" fo:padding-bottom="0cm" fo:padding-left="0cm" fo:padding-right="0cm" loext:decorative="false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2.384cm" fo:padding-top="0cm" fo:padding-bottom="0cm" fo:padding-left="0cm" fo:padding-right="0cm" loext:decorative="false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2.083cm" fo:padding-top="0cm" fo:padding-bottom="0cm" fo:padding-left="0cm" fo:padding-right="0cm" loext:decorative="false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496cm" fo:min-width="2.54cm" fo:padding-top="0cm" fo:padding-bottom="0cm" fo:padding-left="0cm" fo:padding-right="0cm" loext:decorative="false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4.299cm" fo:padding-top="0cm" fo:padding-bottom="0cm" fo:padding-left="0cm" fo:padding-right="0cm" loext:decorative="false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1.986cm" fo:min-width="12.457cm" fo:padding-top="0cm" fo:padding-bottom="0cm" fo:padding-left="0cm" fo:padding-right="0cm" loext:decorative="false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5.51cm" fo:padding-top="0cm" fo:padding-bottom="0cm" fo:padding-left="0cm" fo:padding-right="0cm" loext:decorative="false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2.011cm" fo:padding-top="0cm" fo:padding-bottom="0cm" fo:padding-left="0cm" fo:padding-right="0cm" loext:decorative="false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2.816cm" fo:padding-top="0cm" fo:padding-bottom="0cm" fo:padding-left="0cm" fo:padding-right="0cm" loext:decorative="false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2.487cm" fo:padding-top="0cm" fo:padding-bottom="0cm" fo:padding-left="0cm" fo:padding-right="0cm" loext:decorative="false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1.86cm" fo:padding-top="0cm" fo:padding-bottom="0cm" fo:padding-left="0cm" fo:padding-right="0cm" loext:decorative="false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2.255cm" fo:padding-top="0cm" fo:padding-bottom="0cm" fo:padding-left="0cm" fo:padding-right="0cm" loext:decorative="false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1.733cm" fo:padding-top="0cm" fo:padding-bottom="0cm" fo:padding-left="0cm" fo:padding-right="0cm" loext:decorative="false"/>
      <style:paragraph-properties style:writing-mode="lr-tb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3.761cm" fo:padding-top="0cm" fo:padding-bottom="0cm" fo:padding-left="0cm" fo:padding-right="0cm" loext:decorative="false"/>
      <style:paragraph-properties style:writing-mode="lr-tb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3.81cm" fo:padding-top="0cm" fo:padding-bottom="0cm" fo:padding-left="0cm" fo:padding-right="0cm" loext:decorative="false"/>
      <style:paragraph-properties style:writing-mode="lr-tb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3.973cm" fo:padding-top="0cm" fo:padding-bottom="0cm" fo:padding-left="0cm" fo:padding-right="0cm" loext:decorative="false"/>
      <style:paragraph-properties style:writing-mode="lr-tb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6.468cm" fo:padding-top="0cm" fo:padding-bottom="0cm" fo:padding-left="0cm" fo:padding-right="0cm" loext:decorative="false"/>
      <style:paragraph-properties style:writing-mode="lr-tb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3.968cm" fo:padding-top="0cm" fo:padding-bottom="0cm" fo:padding-left="0cm" fo:padding-right="0cm" loext:decorative="false"/>
      <style:paragraph-properties style:writing-mode="lr-tb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3.103cm" fo:padding-top="0cm" fo:padding-bottom="0cm" fo:padding-left="0cm" fo:padding-right="0cm" loext:decorative="false"/>
      <style:paragraph-properties style:writing-mode="lr-tb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8.549cm" fo:padding-top="0cm" fo:padding-bottom="0cm" fo:padding-left="0cm" fo:padding-right="0cm" loext:decorative="false"/>
      <style:paragraph-properties style:writing-mode="lr-tb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3.812cm" fo:padding-top="0cm" fo:padding-bottom="0cm" fo:padding-left="0cm" fo:padding-right="0cm" loext:decorative="false"/>
      <style:paragraph-properties style:writing-mode="lr-tb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496cm" fo:min-width="3.437cm" fo:padding-top="0cm" fo:padding-bottom="0cm" fo:padding-left="0cm" fo:padding-right="0cm" loext:decorative="false"/>
      <style:paragraph-properties style:writing-mode="lr-tb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496cm" fo:min-width="3.574cm" fo:padding-top="0cm" fo:padding-bottom="0cm" fo:padding-left="0cm" fo:padding-right="0cm" loext:decorative="false"/>
      <style:paragraph-properties style:writing-mode="lr-tb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3.124cm" fo:padding-top="0cm" fo:padding-bottom="0cm" fo:padding-left="0cm" fo:padding-right="0cm" loext:decorative="false"/>
      <style:paragraph-properties style:writing-mode="lr-tb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7.755cm" fo:padding-top="0cm" fo:padding-bottom="0cm" fo:padding-left="0cm" fo:padding-right="0cm" loext:decorative="false"/>
      <style:paragraph-properties style:writing-mode="lr-tb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none"/>
    </style:style>
    <style:style style:name="P3" style:family="paragraph">
      <loext:graphic-properties draw:fill="solid" draw:fill-color="#000000"/>
    </style:style>
    <style:style style:name="P4" style:family="paragraph">
      <style:paragraph-properties fo:text-align="start" style:writing-mode="lr-tb"/>
    </style:style>
    <style:style style:name="P5" style:family="paragraph">
      <loext:graphic-properties draw:fill="none"/>
      <style:text-properties fo:font-size="8pt" style:font-size-asian="8pt" style:font-size-complex="8pt"/>
    </style:style>
    <style:style style:name="P6" style:family="paragraph">
      <loext:graphic-properties draw:fill="solid" draw:fill-color="#5983b0"/>
    </style:style>
    <style:style style:name="P7" style:family="paragraph">
      <loext:graphic-properties draw:fill="none"/>
      <style:paragraph-properties fo:text-align="start"/>
      <style:text-properties fo:color="#5983b0" loext:opacity="100%" fo:font-size="12pt" style:font-size-asian="12pt" style:font-size-complex="12pt"/>
    </style:style>
    <style:style style:name="P8" style:family="paragraph">
      <loext:graphic-properties draw:fill="none"/>
      <style:text-properties fo:font-size="10pt" style:font-size-asian="10pt" style:font-size-complex="10pt"/>
    </style:style>
    <style:style style:name="P9" style:family="paragraph">
      <loext:graphic-properties draw:fill="none"/>
      <style:text-properties fo:font-size="12pt" style:font-size-asian="12pt" style:font-size-complex="12pt"/>
    </style:style>
    <style:style style:name="P10" style:family="paragraph">
      <loext:graphic-properties draw:fill="none"/>
      <style:text-properties fo:font-size="9pt" style:font-size-asian="9pt" style:font-size-complex="9pt"/>
    </style:style>
    <style:style style:name="P11" style:family="paragraph">
      <style:paragraph-properties fo:margin-top="0.42cm" fo:margin-bottom="0.35cm" fo:text-align="start" style:writing-mode="lr-tb"/>
    </style:style>
    <style:style style:name="P12" style:family="paragraph">
      <loext:graphic-properties draw:fill="solid" draw:fill-color="#4e4e4e"/>
    </style:style>
    <style:style style:name="P13" style:family="paragraph">
      <loext:graphic-properties draw:fill="none"/>
      <style:paragraph-properties fo:text-align="start"/>
      <style:text-properties fo:color="#5983b0" loext:opacity="100%" fo:font-size="40pt" style:font-size-asian="40pt" style:font-size-complex="40pt"/>
    </style:style>
    <style:style style:name="P14" style:family="paragraph">
      <loext:graphic-properties draw:fill="none"/>
      <style:text-properties fo:font-size="16pt" style:font-size-asian="16pt" style:font-size-complex="16pt"/>
    </style:style>
    <style:style style:name="P15" style:family="paragraph">
      <style:paragraph-properties fo:margin-top="0.42cm" fo:margin-bottom="0.35cm" fo:text-align="start" style:writing-mode="lr-tb"/>
      <style:text-properties fo:font-size="10pt" style:font-size-asian="10pt" style:font-size-complex="10pt"/>
    </style:style>
    <style:style style:name="T1" style:family="text">
      <style:text-properties fo:color="#747474" loext:opacity="100%" style:font-name="DejaVu Sans" fo:font-size="8pt" fo:font-weight="normal" style:font-name-asian="DejaVu Sans" style:font-size-asian="8pt" style:font-weight-asian="normal" style:font-name-complex="DejaVu Sans" style:font-size-complex="8pt" style:font-weight-complex="normal"/>
    </style:style>
    <style:style style:name="T2" style:family="text">
      <style:text-properties fo:color="#4e4e4e" loext:opacity="100%" style:font-name="DejaVu Sans" fo:font-size="8pt" fo:font-weight="normal" style:font-name-asian="DejaVu Sans" style:font-size-asian="8pt" style:font-weight-asian="normal" style:font-name-complex="DejaVu Sans" style:font-size-complex="8pt" style:font-weight-complex="normal"/>
    </style:style>
    <style:style style:name="T3" style:family="text">
      <style:text-properties fo:color="#5983b0" loext:opacity="100%" style:font-name="Arial Black" fo:font-size="12pt" fo:font-weight="normal" style:font-name-asian="Arial Black" style:font-size-asian="12pt" style:font-weight-asian="normal" style:font-name-complex="Arial Black" style:font-size-complex="12pt" style:font-weight-complex="normal"/>
    </style:style>
    <style:style style:name="T4" style:family="text">
      <style:text-properties fo:color="#4e4e4e" loext:opacity="100%" style:font-name="Arial Black" fo:font-size="10pt" fo:font-weight="normal" style:font-name-asian="Arial Black" style:font-size-asian="10pt" style:font-weight-asian="normal" style:font-name-complex="Arial Black" style:font-size-complex="10pt" style:font-weight-complex="normal"/>
    </style:style>
    <style:style style:name="T5" style:family="text">
      <style:text-properties fo:color="#4e4e4e" loext:opacity="100%" style:font-name="DejaVu Sans" fo:font-size="9pt" fo:font-weight="normal" style:font-name-asian="DejaVu Sans" style:font-size-asian="9pt" style:font-weight-asian="normal" style:font-name-complex="DejaVu Sans" style:font-size-complex="9pt" style:font-weight-complex="normal"/>
    </style:style>
    <style:style style:name="T6" style:family="text">
      <style:text-properties fo:color="#767474" loext:opacity="100%" style:font-name="DejaVu Sans" fo:font-size="8pt" fo:font-weight="normal" style:font-name-asian="DejaVu Sans" style:font-size-asian="8pt" style:font-weight-asian="normal" style:font-name-complex="DejaVu Sans" style:font-size-complex="8pt" style:font-weight-complex="normal"/>
    </style:style>
    <style:style style:name="T7" style:family="text">
      <style:text-properties fo:color="#5983b0" loext:opacity="100%" style:font-name="Arial Black" fo:font-size="40pt" fo:font-weight="normal" style:font-name-asian="Arial Black" style:font-size-asian="40pt" style:font-weight-asian="normal" style:font-name-complex="Arial Black" style:font-size-complex="40pt" style:font-weight-complex="normal"/>
    </style:style>
    <style:style style:name="T8" style:family="text">
      <style:text-properties fo:color="#4e4e4e" loext:opacity="100%" style:font-name="Liberation Sans1" fo:font-size="16pt" fo:font-weight="normal" style:font-name-asian="Liberation Sans1" style:font-size-asian="16pt" style:font-weight-asian="normal" style:font-name-complex="Liberation Sans1" style:font-size-complex="1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0.988cm" svg:height="29.702cm" svg:x="0cm" svg:y="0cm" svg:viewBox="0 0 20989 29703" draw:points="0,0 20989,0 20989,29703 0,29703">
          <text:p/>
        </draw:polygon>
        <draw:polygon draw:style-name="gr1" draw:text-style-name="P1" draw:layer="layout" svg:width="20.988cm" svg:height="29.604cm" svg:x="0cm" svg:y="0cm" svg:viewBox="0 0 20989 29605" draw:points="0,0 20989,0 20989,29605 0,29605">
          <text:p/>
        </draw:polygon>
        <draw:line draw:style-name="gr2" draw:text-style-name="P2" draw:layer="layout" svg:x1="0.704cm" svg:y1="3.679cm" svg:x2="20.248cm" svg:y2="3.679cm">
          <text:p/>
        </draw:line>
        <draw:line draw:style-name="gr2" draw:text-style-name="P2" draw:layer="layout" svg:x1="0.776cm" svg:y1="5.302cm" svg:x2="20.319cm" svg:y2="5.302cm">
          <text:p/>
        </draw:line>
        <draw:line draw:style-name="gr2" draw:text-style-name="P2" draw:layer="layout" svg:x1="0.704cm" svg:y1="28.056cm" svg:x2="20.248cm" svg:y2="28.056cm">
          <text:p/>
        </draw:line>
        <draw:line draw:style-name="gr2" draw:text-style-name="P2" draw:layer="layout" svg:x1="15.24cm" svg:y1="5.715cm" svg:x2="15.193cm" svg:y2="27.304cm">
          <text:p/>
        </draw:line>
        <draw:path draw:style-name="gr3" draw:text-style-name="P3" draw:layer="layout" svg:width="0.424cm" svg:height="0.425cm" svg:x="3.492cm" svg:y="28.575cm" svg:viewBox="0 0 425 426" svg:d="M379 0c26 0 46 21 46 47v332c0 27-20 47-46 47h-335c-24 0-44-20-44-47v-332c0-26 20-47 44-47zM264 364c61-21 104-80 104-150 0-86-70-152-156-152-87 0-155 66-155 152 0 70 42 129 108 150 7 1 9-3 9-7s0-26 0-39c0 0-43 10-52-18 0 0-8-19-19-23 0 0-14-10 1-10 0 0 16 1 26 16 13 24 36 17 45 13 2-10 5-17 11-21-35-4-72-9-72-69 0-17 5-26 16-37-2-4-8-21 1-42 14-4 43 17 43 17 12-4 26-6 40-6 13 0 27 2 39 6 0 0 31-21 43-17 8 22 3 38 2 42 9 11 15 20 15 37 0 61-35 65-70 69 4 5 9 15 9 29 0 21 0 47 0 53 0 4 3 8 12 7zM171 306c1 0 3-1 3-3 0-1-3-1-5-1-1 0-3 1-1 3 0 1 1 2 3 1zM162 305c0-1-2-2-3-2-2 0-3 1-3 2 0 2 1 3 3 3 1 0 3-1 3-3zM148 304c1-1 0-2-2-3-1 0-4 0-4 2 0 1 1 2 3 3 1 0 3 0 3-2zM137 299c2 0 0-2 0-4-1-1-3-1-4 0-2 1-2 3 1 4 0 1 3 1 3 0zM128 291c2-1 2-3 0-4 0-2-2-2-3-1 0 0 0 2 0 3 1 2 3 2 3 2zM122 282c1-1 1-2 0-4 0-1-3-1-3 0 0 0 0 2 0 3 1 1 3 1 3 1zM116 275c0-1 0-2-2-3 0 0-2 0-2 1-2 1 0 2 2 3 0 0 2 0 2-1z">
          <text:p/>
        </draw:path>
        <draw:path draw:style-name="gr3" draw:text-style-name="P3" draw:layer="layout" svg:width="0.425cm" svg:height="0.425cm" svg:x="10.4cm" svg:y="28.575cm" svg:viewBox="0 0 426 426" svg:d="M394 0c17 0 32 14 32 31v363c0 18-15 32-32 32h-363c-16 0-31-14-31-32v-363c0-17 15-31 31-31zM129 364v-202h-62v202zM99 135c20 0 35-17 35-37s-15-36-35-36-37 16-37 36 17 37 37 37zM365 364v-110c0-55-12-97-75-97-32 0-52 17-60 33h-1v-28h-60v202h63v-100c0-26 5-51 38-51 31 0 32 30 32 53v98z">
          <text:p/>
        </draw:path>
        <draw:frame draw:style-name="gr4" draw:text-style-name="P5" draw:layer="layout" svg:width="3.889cm" svg:height="0.331cm" svg:x="4.092cm" svg:y="28.631cm">
          <draw:text-box>
            <text:p text:style-name="P4"><text:span text:style-name="T1">github.com/joshua-arellano</text:span></text:p>
          </draw:text-box>
        </draw:frame>
        <draw:frame draw:style-name="gr5" draw:text-style-name="P5" draw:layer="layout" svg:width="6.173cm" svg:height="0.331cm" svg:x="11.101cm" svg:y="28.631cm">
          <draw:text-box>
            <text:p text:style-name="P4"><text:span text:style-name="T1">linkedin.com/in/joshua-arellano-5379b13b8</text:span></text:p>
          </draw:text-box>
        </draw:frame>
        <draw:frame draw:style-name="gr6" draw:text-style-name="P5" draw:layer="layout" svg:width="2.256cm" svg:height="0.331cm" svg:x="15.699cm" svg:y="20.451cm">
          <draw:text-box>
            <text:p text:style-name="P4"><text:span text:style-name="T2">English (Native)</text:span></text:p>
          </draw:text-box>
        </draw:frame>
        <draw:polygon draw:style-name="gr7" draw:text-style-name="P6" draw:layer="layout" svg:width="0.176cm" svg:height="0.565cm" svg:x="15.698cm" svg:y="19.513cm" svg:viewBox="0 0 177 566" draw:points="0,0 177,0 177,566 0,566">
          <text:p/>
        </draw:polygon>
        <draw:frame draw:style-name="gr8" draw:text-style-name="P7" draw:layer="layout" svg:width="2.965cm" svg:height="0.598cm" svg:x="16.228cm" svg:y="19.479cm">
          <draw:text-box>
            <text:p text:style-name="P4"><text:span text:style-name="T3">LANGUAGES</text:span></text:p>
          </draw:text-box>
        </draw:frame>
        <draw:frame draw:style-name="gr9" draw:text-style-name="P8" draw:layer="layout" svg:width="5.137cm" svg:height="0.496cm" svg:x="15.699cm" svg:y="15.307cm">
          <draw:text-box>
            <text:p text:style-name="P4"><text:span text:style-name="T4">App and Web Development</text:span></text:p>
          </draw:text-box>
        </draw:frame>
        <draw:frame draw:style-name="gr10" draw:text-style-name="P5" draw:layer="layout" svg:width="3.66cm" svg:height="0.331cm" svg:x="15.699cm" svg:y="15.941cm">
          <draw:text-box>
            <text:p text:style-name="P4"><text:span text:style-name="T1">Ranken Technical College</text:span></text:p>
          </draw:text-box>
        </draw:frame>
        <draw:frame draw:style-name="gr11" draw:text-style-name="P5" draw:layer="layout" svg:width="1.548cm" svg:height="0.331cm" svg:x="15.699cm" svg:y="16.435cm">
          <draw:text-box>
            <text:p text:style-name="P4"><text:span text:style-name="T1">2025-2027</text:span></text:p>
          </draw:text-box>
        </draw:frame>
        <draw:frame draw:style-name="gr12" draw:text-style-name="P8" draw:layer="layout" svg:width="3.985cm" svg:height="0.496cm" svg:x="15.699cm" svg:y="17.477cm">
          <draw:text-box>
            <text:p text:style-name="P4"><text:span text:style-name="T4">High School Diploma</text:span></text:p>
          </draw:text-box>
        </draw:frame>
        <draw:frame draw:style-name="gr13" draw:text-style-name="P5" draw:layer="layout" svg:width="2.69cm" svg:height="0.331cm" svg:x="15.699cm" svg:y="18.111cm">
          <draw:text-box>
            <text:p text:style-name="P4"><text:span text:style-name="T1">Pacific High School</text:span></text:p>
          </draw:text-box>
        </draw:frame>
        <draw:polygon draw:style-name="gr7" draw:text-style-name="P6" draw:layer="layout" svg:width="0.176cm" svg:height="0.566cm" svg:x="15.698cm" svg:y="14.456cm" svg:viewBox="0 0 177 567" draw:points="0,0 177,0 177,567 0,567">
          <text:p/>
        </draw:polygon>
        <draw:frame draw:style-name="gr11" draw:text-style-name="P5" draw:layer="layout" svg:width="1.548cm" svg:height="0.331cm" svg:x="15.699cm" svg:y="18.605cm">
          <draw:text-box>
            <text:p text:style-name="P4"><text:span text:style-name="T1">2021-2025</text:span></text:p>
          </draw:text-box>
        </draw:frame>
        <draw:polygon draw:style-name="gr7" draw:text-style-name="P6" draw:layer="layout" svg:width="0.177cm" svg:height="0.565cm" svg:x="15.733cm" svg:y="6.055cm" svg:viewBox="0 0 178 566" draw:points="0,0 178,0 178,566 0,566">
          <text:p/>
        </draw:polygon>
        <draw:frame draw:style-name="gr14" draw:text-style-name="P9" draw:layer="layout" svg:width="2.824cm" svg:height="0.598cm" svg:x="16.228cm" svg:y="14.423cm">
          <draw:text-box>
            <text:p text:style-name="P4"><text:span text:style-name="T3">EDUCATION</text:span></text:p>
          </draw:text-box>
        </draw:frame>
        <draw:frame draw:style-name="gr15" draw:text-style-name="P9" draw:layer="layout" svg:width="1.696cm" svg:height="0.598cm" svg:x="16.263cm" svg:y="6.021cm">
          <draw:text-box>
            <text:p text:style-name="P4"><text:span text:style-name="T3">SKILLS</text:span></text:p>
          </draw:text-box>
        </draw:frame>
        <draw:frame draw:style-name="gr16" draw:text-style-name="P5" draw:layer="layout" svg:width="2.621cm" svg:height="0.331cm" svg:x="15.699cm" svg:y="7.974cm">
          <draw:text-box>
            <text:p text:style-name="P4"><text:span text:style-name="T2">Node.js/Vite/React</text:span></text:p>
          </draw:text-box>
        </draw:frame>
        <draw:frame draw:style-name="gr17" draw:text-style-name="P5" draw:layer="layout" svg:width="1.445cm" svg:height="0.331cm" svg:x="15.699cm" svg:y="8.574cm">
          <draw:text-box>
            <text:p text:style-name="P4"><text:span text:style-name="T2">HTML/CSS</text:span></text:p>
          </draw:text-box>
        </draw:frame>
        <draw:frame draw:style-name="gr18" draw:text-style-name="P8" draw:layer="layout" svg:width="1.896cm" svg:height="0.496cm" svg:x="15.699cm" svg:y="7.341cm">
          <draw:text-box>
            <text:p text:style-name="P4"><text:span text:style-name="T4">Technical</text:span></text:p>
          </draw:text-box>
        </draw:frame>
        <draw:frame draw:style-name="gr19" draw:text-style-name="P5" draw:layer="layout" svg:width="3.523cm" svg:height="0.331cm" svg:x="15.699cm" svg:y="11.484cm">
          <draw:text-box>
            <text:p text:style-name="P4"><text:span text:style-name="T2">Eﬀective communication</text:span></text:p>
          </draw:text-box>
        </draw:frame>
        <draw:frame draw:style-name="gr20" draw:text-style-name="P5" draw:layer="layout" svg:width="1.782cm" svg:height="0.331cm" svg:x="15.699cm" svg:y="12.084cm">
          <draw:text-box>
            <text:p text:style-name="P4"><text:span text:style-name="T2">Team player</text:span></text:p>
          </draw:text-box>
        </draw:frame>
        <draw:frame draw:style-name="gr21" draw:text-style-name="P5" draw:layer="layout" svg:width="3.162cm" svg:height="0.331cm" svg:x="15.699cm" svg:y="12.719cm">
          <draw:text-box>
            <text:p text:style-name="P4"><text:span text:style-name="T2">Strong problem solver</text:span></text:p>
          </draw:text-box>
        </draw:frame>
        <draw:frame draw:style-name="gr22" draw:text-style-name="P5" draw:layer="layout" svg:width="3.47cm" svg:height="0.331cm" svg:x="15.699cm" svg:y="13.419cm">
          <draw:text-box>
            <text:p text:style-name="P4"><text:span text:style-name="T2">Good time management</text:span></text:p>
          </draw:text-box>
        </draw:frame>
        <draw:frame draw:style-name="gr23" draw:text-style-name="P8" draw:layer="layout" svg:width="2.384cm" svg:height="0.496cm" svg:x="15.699cm" svg:y="10.74cm">
          <draw:text-box>
            <text:p text:style-name="P4"><text:span text:style-name="T4">Professional</text:span></text:p>
          </draw:text-box>
        </draw:frame>
        <draw:frame draw:style-name="gr24" draw:text-style-name="P10" draw:layer="layout" svg:width="0.317cm" svg:height="0.374cm" svg:x="0.706cm" svg:y="22.813cm">
          <draw:text-box>
            <text:p text:style-name="P4"><text:span text:style-name="T5"><text:s/></text:span></text:p>
          </draw:text-box>
        </draw:frame>
        <draw:frame draw:style-name="gr25" draw:text-style-name="P10" draw:layer="layout" svg:width="14.204cm" svg:height="0.374cm" svg:x="0.706cm" svg:y="17.442cm">
          <draw:text-box>
            <text:p text:style-name="P11"><text:span text:style-name="T5">A web based </text:span><text:span text:style-name="T5"><text:a xlink:href="https://joshua-arellano.github.io/weather-app/" xlink:type="simple">weather app</text:a></text:span><text:span text:style-name="T5"><text:s/>that uses OpenWeatherApi to fetch the temperature and</text:span></text:p>
          </draw:text-box>
        </draw:frame>
        <draw:frame draw:style-name="gr26" draw:text-style-name="P8" draw:layer="layout" svg:width="4.16cm" svg:height="0.496cm" svg:x="0.706cm" svg:y="16.805cm">
          <draw:text-box>
            <text:p text:style-name="P11"><text:span text:style-name="T4">React.js Weather App</text:span></text:p>
          </draw:text-box>
        </draw:frame>
        <draw:frame draw:style-name="gr27" draw:text-style-name="P10" draw:layer="layout" svg:width="13.756cm" svg:height="0.747cm" svg:x="0.706cm" svg:y="19.306cm">
          <draw:text-box>
            <text:p text:style-name="P4"><text:span text:style-name="T5">A database mock written in javascript to act like a real database and manage</text:span></text:p>
            <text:p text:style-name="P4"><text:span text:style-name="T5">all of your collection</text:span></text:p>
          </draw:text-box>
        </draw:frame>
        <draw:frame draw:style-name="gr28" draw:text-style-name="P8" draw:layer="layout" svg:width="4.258cm" svg:height="0.496cm" svg:x="0.706cm" svg:y="18.663cm">
          <draw:text-box>
            <text:p text:style-name="P4"><text:span text:style-name="T4">Video Game Database</text:span></text:p>
          </draw:text-box>
        </draw:frame>
        <draw:polygon draw:style-name="gr7" draw:text-style-name="P6" draw:layer="layout" svg:width="0.178cm" svg:height="0.565cm" svg:x="0.704cm" svg:y="15.596cm" svg:viewBox="0 0 179 566" draw:points="0,0 179,0 179,566 0,566">
          <text:p/>
        </draw:polygon>
        <draw:polygon draw:style-name="gr7" draw:text-style-name="P6" draw:layer="layout" svg:width="0.178cm" svg:height="0.565cm" svg:x="0.704cm" svg:y="5.955cm" svg:viewBox="0 0 179 566" draw:points="0,0 179,0 179,566 0,566">
          <text:p/>
        </draw:polygon>
        <draw:frame draw:style-name="gr29" draw:text-style-name="P9" draw:layer="layout" svg:width="2.518cm" svg:height="0.598cm" svg:x="1.235cm" svg:y="15.562cm">
          <draw:text-box>
            <text:p text:style-name="P4"><text:span text:style-name="T3">PROJECTS</text:span></text:p>
          </draw:text-box>
        </draw:frame>
        <draw:frame draw:style-name="gr30" draw:text-style-name="P7" draw:layer="layout" svg:width="4.941cm" svg:height="0.598cm" svg:x="1.235cm" svg:y="5.921cm">
          <draw:text-box>
            <text:p text:style-name="P4"><text:span text:style-name="T3">WORK EXPERIENCES</text:span></text:p>
          </draw:text-box>
        </draw:frame>
        <draw:frame draw:style-name="gr24" draw:text-style-name="P10" draw:layer="layout" svg:width="0.317cm" svg:height="0.374cm" svg:x="0.706cm" svg:y="19.462cm">
          <draw:text-box>
            <text:p text:style-name="P4"><text:span text:style-name="T5"><text:s/></text:span></text:p>
          </draw:text-box>
        </draw:frame>
        <draw:frame draw:style-name="gr24" draw:text-style-name="P10" draw:layer="layout" svg:width="0.317cm" svg:height="0.374cm" svg:x="0.706cm" svg:y="16.887cm">
          <draw:text-box>
            <text:p text:style-name="P4"><text:span text:style-name="T5"><text:s/></text:span></text:p>
          </draw:text-box>
        </draw:frame>
        <draw:frame draw:style-name="gr31" draw:text-style-name="P8" draw:layer="layout" svg:width="4.668cm" svg:height="0.496cm" svg:x="0.506cm" svg:y="11.82cm">
          <draw:text-box>
            <text:p text:style-name="P4"><text:span text:style-name="T4">Ice Cream Manufacturer</text:span></text:p>
          </draw:text-box>
        </draw:frame>
        <draw:frame draw:style-name="gr32" draw:text-style-name="P5" draw:layer="layout" svg:width="5.267cm" svg:height="0.331cm" svg:x="9.767cm" svg:y="12.554cm">
          <draw:text-box>
            <text:p text:style-name="P4"><text:span text:style-name="T6">Clementines Creamery | 2020 - 2021</text:span></text:p>
          </draw:text-box>
        </draw:frame>
        <draw:frame draw:style-name="gr24" draw:text-style-name="P10" draw:layer="layout" svg:width="0.317cm" svg:height="0.374cm" svg:x="0.706cm" svg:y="9.972cm">
          <draw:text-box>
            <text:p text:style-name="P4"><text:span text:style-name="T5"><text:s/></text:span></text:p>
          </draw:text-box>
        </draw:frame>
        <draw:frame draw:style-name="gr24" draw:text-style-name="P10" draw:layer="layout" svg:width="0.317cm" svg:height="0.374cm" svg:x="0.706cm" svg:y="11.131cm">
          <draw:text-box>
            <text:p text:style-name="P4"><text:span text:style-name="T5"><text:s/></text:span></text:p>
          </draw:text-box>
        </draw:frame>
        <draw:frame draw:style-name="gr24" draw:text-style-name="P10" draw:layer="layout" svg:width="0.317cm" svg:height="0.374cm" svg:x="0.706cm" svg:y="11.56cm">
          <draw:text-box>
            <text:p text:style-name="P4"><text:span text:style-name="T5"><text:s/></text:span></text:p>
          </draw:text-box>
        </draw:frame>
        <draw:path draw:style-name="gr33" draw:text-style-name="P12" draw:layer="layout" svg:width="0.142cm" svg:height="0.142cm" svg:x="0.733cm" svg:y="9.252cm" svg:viewBox="0 0 143 143" svg:d="M73 143c-41 0-73-31-73-71 0-39 32-72 73-72 40 0 70 33 70 72 0 40-30 71-70 71z">
          <text:p/>
        </draw:path>
        <draw:frame draw:style-name="gr34" draw:text-style-name="P10" draw:layer="layout" svg:width="4.597cm" svg:height="0.374cm" svg:x="0.506cm" svg:y="7.589cm">
          <draw:text-box>
            <text:p text:style-name="P4"><text:span text:style-name="T5">Full Time Cook/Baker/Barista</text:span></text:p>
          </draw:text-box>
        </draw:frame>
        <draw:path draw:style-name="gr33" draw:text-style-name="P12" draw:layer="layout" svg:width="0.142cm" svg:height="0.142cm" svg:x="0.733cm" svg:y="10.458cm" svg:viewBox="0 0 143 143" svg:d="M73 143c-41 0-73-33-73-73 0-39 32-70 73-70 40 0 70 31 70 70 0 40-30 73-70 73z">
          <text:p/>
        </draw:path>
        <draw:frame draw:style-name="gr35" draw:text-style-name="P10" draw:layer="layout" svg:width="12.384cm" svg:height="0.374cm" svg:x="1.182cm" svg:y="9.135cm">
          <draw:text-box>
            <text:p text:style-name="P4"><text:span text:style-name="T5">Maintained cleanliness and sanitation of work areas and equipment to ensure</text:span></text:p>
          </draw:text-box>
        </draw:frame>
        <draw:frame draw:style-name="gr36" draw:text-style-name="P10" draw:layer="layout" svg:width="12.083cm" svg:height="0.374cm" svg:x="1.182cm" svg:y="10.341cm">
          <draw:text-box>
            <text:p text:style-name="P4"><text:span text:style-name="T5">Collaborated team members to ensure smooth operation during peak hours</text:span></text:p>
          </draw:text-box>
        </draw:frame>
        <draw:frame draw:style-name="gr37" draw:text-style-name="P8" draw:layer="layout" svg:width="2.54cm" svg:height="0.496cm" svg:x="0.506cm" svg:y="6.864cm">
          <draw:text-box>
            <text:p text:style-name="P4"><text:span text:style-name="T4">Kitchen Staff</text:span></text:p>
          </draw:text-box>
        </draw:frame>
        <draw:frame draw:style-name="gr38" draw:text-style-name="P5" draw:layer="layout" svg:width="4.299cm" svg:height="0.331cm" svg:x="10.718cm" svg:y="7.473cm">
          <draw:text-box>
            <text:p text:style-name="P4"><text:span text:style-name="T1">Kaldi’s Coﬀee | 2024 - Present</text:span></text:p>
          </draw:text-box>
        </draw:frame>
        <draw:frame draw:style-name="gr24" draw:text-style-name="P10" draw:layer="layout" svg:width="0.317cm" svg:height="0.374cm" svg:x="4.022cm" svg:y="4.691cm">
          <draw:text-box>
            <text:p text:style-name="P4"><text:span text:style-name="T5"><text:s/></text:span></text:p>
          </draw:text-box>
        </draw:frame>
        <draw:path draw:style-name="gr3" draw:text-style-name="P3" draw:layer="layout" svg:width="0.353cm" svg:height="0.354cm" svg:x="15.733cm" svg:y="0.74cm" svg:viewBox="0 0 354 355" svg:d="M315 0c23 0 39 17 39 38v279c0 21-16 38-39 38h-277c-21 0-38-17-38-38v-279c0-21 17-38 38-38zM73 305c126 0 230-102 230-231 0-5-3-10-9-11l-52-12c-5-1-11 2-14 7l-23 55c-3 5 0 10 3 14l31 26c-19 38-49 69-89 87l-23-29c-3-4-9-6-14-4l-55 24c-6 2-9 8-8 13l13 52c1 5 6 9 10 9z">
          <text:p/>
        </draw:path>
        <draw:path draw:style-name="gr3" draw:text-style-name="P3" draw:layer="layout" svg:width="0.353cm" svg:height="0.354cm" svg:x="15.733cm" svg:y="1.446cm" svg:viewBox="0 0 354 355" svg:d="M315 0c23 0 39 17 39 38v279c0 21-16 38-39 38h-277c-21 0-38-17-38-38v-279c0-21 17-38 38-38zM141 183c7 6 24 21 35 20 12 1 29-14 37-20 72-54 72-54 90-69v-20c0-10-9-19-18-19h-216c-11 0-19 9-19 19v20c19 15 19 15 91 69zM303 147c-11 10-26 21-75 56-11 8-31 26-52 26-20 0-40-17-51-26-49-35-64-46-75-56v113c0 11 8 19 19 19h216c9 0 18-8 18-19z">
          <text:p/>
        </draw:path>
        <draw:path draw:style-name="gr3" draw:text-style-name="P3" draw:layer="layout" svg:width="0.353cm" svg:height="0.354cm" svg:x="15.733cm" svg:y="2.151cm" svg:viewBox="0 0 354 355" svg:d="M240 109h-127c11-64 34-109 63-109s52 45 64 109zM107 179c0-16 2-32 3-48h133c0 16 2 32 2 48s-2 31-2 45h-133c-1-14-3-29-3-45zM341 109h-78c-8-41-20-77-37-101 51 15 94 52 115 101zM125 8c-16 24-29 60-35 101h-76c20-49 61-86 111-101zM348 131c5 16 6 32 6 48s-1 31-6 45h-83c1-15 3-30 3-45s-2-32-3-48zM86 179c0 15 1 30 1 45h-81c-3-14-6-29-6-45s3-32 6-48h81c0 16-1 33-1 48zM113 247h127c-12 64-35 108-64 108s-52-44-63-108zM226 348c19-24 29-60 37-101h79c-22 48-65 86-116 101zM14 247h76c6 41 19 77 37 101-52-15-93-53-113-101z">
          <text:p/>
        </draw:path>
        <draw:path draw:style-name="gr3" draw:text-style-name="P3" draw:layer="layout" svg:width="0.353cm" svg:height="0.472cm" svg:x="15.733cm" svg:y="2.786cm" svg:viewBox="0 0 354 473" svg:d="M159 463c-135-195-159-215-159-286 0-98 78-177 176-177s178 79 178 177c0 71-24 91-160 286-9 13-27 13-35 0zM176 250c41 0 73-33 73-73 0-41-32-74-73-74-40 0-74 33-74 74 0 40 34 73 74 73z">
          <text:p/>
        </draw:path>
        <draw:frame draw:style-name="gr39" draw:text-style-name="P13" draw:layer="layout" svg:width="12.457cm" svg:height="1.986cm" svg:x="0.706cm" svg:y="0.415cm">
          <draw:text-box>
            <text:p text:style-name="P4"><text:span text:style-name="T7">Joshua Arellano</text:span></text:p>
          </draw:text-box>
        </draw:frame>
        <draw:frame draw:style-name="gr40" draw:text-style-name="P14" draw:layer="layout" svg:width="5.51cm" svg:height="0.628cm" svg:x="0.741cm" svg:y="2.303cm">
          <draw:text-box>
            <text:p text:style-name="P4"><text:span text:style-name="T8">AWD Ranken Student</text:span></text:p>
          </draw:text-box>
        </draw:frame>
        <draw:frame draw:style-name="gr41" draw:text-style-name="P5" draw:layer="layout" svg:width="2.011cm" svg:height="0.331cm" svg:x="16.298cm" svg:y="0.761cm">
          <draw:text-box>
            <text:p text:style-name="P4"><text:span text:style-name="T2">636-744-5547</text:span></text:p>
          </draw:text-box>
        </draw:frame>
        <draw:frame draw:style-name="gr42" draw:text-style-name="P5" draw:layer="layout" svg:width="2.816cm" svg:height="0.331cm" svg:x="16.298cm" svg:y="1.467cm">
          <draw:text-box>
            <text:p text:style-name="P4"><text:span text:style-name="T2">contact@josh-a.dev</text:span></text:p>
          </draw:text-box>
        </draw:frame>
        <draw:frame draw:style-name="gr43" draw:text-style-name="P5" draw:layer="layout" svg:width="2.487cm" svg:height="0.331cm" svg:x="16.298cm" svg:y="2.172cm">
          <draw:text-box>
            <text:p text:style-name="P4"><text:span text:style-name="T2"><text:a xlink:href="https://josh-a.dev/" xlink:type="simple">https://josh-a.dev</text:a></text:span></text:p>
          </draw:text-box>
        </draw:frame>
        <draw:frame draw:style-name="gr44" draw:text-style-name="P5" draw:layer="layout" svg:width="1.86cm" svg:height="0.331cm" svg:x="16.298cm" svg:y="2.878cm">
          <draw:text-box>
            <text:p text:style-name="P4"><text:span text:style-name="T2">St. Louis, MO</text:span></text:p>
          </draw:text-box>
        </draw:frame>
        <draw:frame draw:style-name="gr45" draw:text-style-name="P5" draw:layer="layout" svg:width="2.255cm" svg:height="0.331cm" svg:x="15.729cm" svg:y="9.851cm">
          <draw:text-box>
            <text:p text:style-name="P4"><text:span text:style-name="T2">Object Oriented</text:span></text:p>
          </draw:text-box>
        </draw:frame>
        <draw:frame draw:style-name="gr46" draw:text-style-name="P5" draw:layer="layout" svg:width="1.733cm" svg:height="0.331cm" svg:x="15.7cm" svg:y="9.21cm">
          <draw:text-box>
            <text:p text:style-name="P4"><text:span text:style-name="T2">C#/ASP.NET</text:span></text:p>
          </draw:text-box>
        </draw:frame>
        <draw:frame draw:style-name="gr47" draw:text-style-name="P10" draw:layer="layout" svg:width="3.761cm" svg:height="0.374cm" svg:x="0.508cm" svg:y="12.489cm">
          <draw:text-box>
            <text:p text:style-name="P4"><text:span text:style-name="T5">Summer Job for 2 Years</text:span></text:p>
          </draw:text-box>
        </draw:frame>
        <draw:path draw:style-name="gr33" draw:text-style-name="P12" draw:layer="layout" svg:width="0.142cm" svg:height="0.142cm" svg:x="0.733cm" svg:y="8.552cm" svg:viewBox="0 0 143 143" svg:d="M73 143c-41 0-73-31-73-72 0-39 32-71 73-71 40 0 70 32 70 71 0 41-30 72-70 72z">
          <text:p/>
        </draw:path>
        <draw:frame draw:style-name="gr48" draw:text-style-name="P10" draw:layer="layout" svg:width="13.81cm" svg:height="0.747cm" svg:x="1.209cm" svg:y="13.289cm">
          <draw:text-box>
            <text:p text:style-name="P15"><text:span text:style-name="T5">Prepared Ice cream from scratch in machines, prepped ingredients, and manufactured to serve at all Clementines Creamery locations. </text:span></text:p>
          </draw:text-box>
        </draw:frame>
        <draw:frame draw:style-name="gr49" draw:text-style-name="P10" draw:layer="layout" svg:width="13.973cm" svg:height="0.374cm" svg:x="1.182cm" svg:y="8.435cm">
          <draw:text-box>
            <text:p text:style-name="P4"><text:span text:style-name="T5">Prepared Food/Drinks/Bakery according to recipes, quality standards, and presentation.</text:span></text:p>
          </draw:text-box>
        </draw:frame>
        <draw:frame draw:style-name="gr50" draw:text-style-name="P10" draw:layer="layout" svg:width="6.468cm" svg:height="0.374cm" svg:x="1.182cm" svg:y="9.735cm">
          <draw:text-box>
            <text:p text:style-name="P4"><text:span text:style-name="T5">compliance with food safety regulations.</text:span></text:p>
          </draw:text-box>
        </draw:frame>
        <draw:frame draw:style-name="gr51" draw:text-style-name="P10" draw:layer="layout" svg:width="13.968cm" svg:height="0.374cm" svg:x="1.183cm" svg:y="10.941cm">
          <draw:text-box>
            <text:p text:style-name="P4"><text:span text:style-name="T5">Manage inventory levels by FIFO, and notifying management of any low stock or waste.</text:span></text:p>
          </draw:text-box>
        </draw:frame>
        <draw:path draw:style-name="gr33" draw:text-style-name="P12" draw:layer="layout" svg:width="0.142cm" svg:height="0.142cm" svg:x="0.733cm" svg:y="13.358cm" svg:viewBox="0 0 143 143" svg:d="M73 143c-41 0-73-33-73-73 0-39 32-70 73-70 40 0 70 31 70 70 0 40-30 73-70 73z">
          <text:p/>
        </draw:path>
        <draw:path draw:style-name="gr33" draw:text-style-name="P12" draw:layer="layout" svg:width="0.142cm" svg:height="0.142cm" svg:x="0.733cm" svg:y="11.058cm" svg:viewBox="0 0 143 143" svg:d="M73 143c-41 0-73-32-73-72s32-71 73-71c40 0 70 31 70 71s-30 72-70 72z">
          <text:p/>
        </draw:path>
        <draw:frame draw:style-name="gr52" draw:text-style-name="P10" draw:layer="layout" svg:width="13.103cm" svg:height="0.374cm" svg:x="0.707cm" svg:y="20.906cm">
          <draw:text-box>
            <text:p text:style-name="P4"><text:span text:style-name="T5">My personal portfolio is built with HTML, CSS, and Javascript to showcase my work</text:span></text:p>
          </draw:text-box>
        </draw:frame>
        <draw:frame draw:style-name="gr53" draw:text-style-name="P10" draw:layer="layout" svg:width="18.549cm" svg:height="0.374cm" svg:x="1.042cm" svg:y="4.371cm">
          <draw:text-box>
            <text:p text:style-name="P4"><text:span text:style-name="T5">Hello, I am pursuing app and web development and strive to learn as much as possible and push myself to the limit.</text:span></text:p>
          </draw:text-box>
        </draw:frame>
        <draw:frame draw:style-name="gr54" draw:text-style-name="P10" draw:layer="layout" svg:width="6.948cm" svg:height="0.374cm" svg:x="0.706cm" svg:y="17.942cm">
          <draw:text-box>
            <text:p text:style-name="P11"><text:span text:style-name="T5">weather conditions from any input location.</text:span></text:p>
          </draw:text-box>
        </draw:frame>
        <draw:frame draw:style-name="gr55" draw:text-style-name="P8" draw:layer="layout" svg:width="3.437cm" svg:height="0.496cm" svg:x="0.706cm" svg:y="20.263cm">
          <draw:text-box>
            <text:p text:style-name="P4"><text:span text:style-name="T4">Personal Portfolio</text:span></text:p>
          </draw:text-box>
        </draw:frame>
        <draw:frame draw:style-name="gr56" draw:text-style-name="P8" draw:layer="layout" svg:width="6.132cm" svg:height="0.496cm" svg:x="0.707cm" svg:y="21.563cm">
          <draw:text-box>
            <text:p text:style-name="P4"><text:span text:style-name="T4">Emulator Frontend Final Project</text:span></text:p>
          </draw:text-box>
        </draw:frame>
        <draw:frame draw:style-name="gr57" draw:text-style-name="P10" draw:layer="layout" svg:width="13.845cm" svg:height="0.374cm" svg:x="0.708cm" svg:y="22.206cm">
          <draw:text-box>
            <text:p text:style-name="P4"><text:span text:style-name="T5">This emulator frontend was built with SQL and C# to be a CRUD application that’s able</text:span></text:p>
          </draw:text-box>
        </draw:frame>
        <draw:frame draw:style-name="gr58" draw:text-style-name="P10" draw:layer="layout" svg:width="7.755cm" svg:height="0.374cm" svg:x="0.708cm" svg:y="22.606cm">
          <draw:text-box>
            <text:p text:style-name="P4"><text:span text:style-name="T5">to play and manage your video games and data.</text:span></text:p>
          </draw:text-box>
        </draw:frame>
        <draw:frame draw:style-name="gr48" draw:text-style-name="P10" draw:layer="layout" svg:width="13.81cm" svg:height="0.374cm" svg:x="1.209cm" svg:y="14.29cm">
          <draw:text-box>
            <text:p text:style-name="P15"><text:span text:style-name="T5">Operated ice cream machines to produce high-quality products while adhering to </text:span></text:p>
          </draw:text-box>
        </draw:frame>
        <draw:path draw:style-name="gr33" draw:text-style-name="P12" draw:layer="layout" svg:width="0.142cm" svg:height="0.142cm" svg:x="0.734cm" svg:y="14.459cm" svg:viewBox="0 0 143 143" svg:d="M73 143c-41 0-73-33-73-73 0-39 32-70 73-70 40 0 70 31 70 70 0 40-30 73-70 73z">
          <text:p/>
        </draw:path>
        <draw:frame draw:style-name="gr48" draw:text-style-name="P10" draw:layer="layout" svg:width="13.81cm" svg:height="0.374cm" svg:x="1.209cm" svg:y="14.69cm">
          <draw:text-box>
            <text:p text:style-name="P15"><text:span text:style-name="T5">safety guideline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Arial Black" svg:font-family="'Arial Black'"/>
    <style:font-face style:name="DejaVu Sans" svg:font-family="'DejaVu Sans'"/>
    <style:font-face style:name="Liberation Sans" svg:font-family="'Liberation Sans'" style:font-family-generic="roman" style:font-pitch="variable"/>
    <style:font-face style:name="Liberation Sans1" svg:font-family="'Liberation Sans'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0.989cm" fo:page-height="29.70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print-date>2026-06-16T20:05:28.115329700</meta:print-date>
    <meta:printed-by>PDF files</meta:printed-by>
    <dc:date>2026-06-16T20:05:46.186339600</dc:date>
    <meta:editing-duration>PT5H12M5S</meta:editing-duration>
    <meta:editing-cycles>2</meta:editing-cycles>
    <meta:generator>LibreOffice/26.2.4.2$Windows_X86_64 LibreOffice_project/0229ac93fcf0d7cbc6376066c6f35021cef002dc</meta:generator>
    <meta:document-statistic meta:object-count="85"/>
  </office:meta>
</office:document-meta>
</file>